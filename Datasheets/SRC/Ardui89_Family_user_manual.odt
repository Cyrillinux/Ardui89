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7000000538C1647976.png" manifest:media-type="image/png"/>
  <manifest:file-entry manifest:full-path="Pictures/10000001000004E2000002AC6F1DE1D5.png" manifest:media-type="image/png"/>
  <manifest:file-entry manifest:full-path="Pictures/1000000100000780000004B055BC5011.png" manifest:media-type="image/png"/>
  <manifest:file-entry manifest:full-path="Pictures/1000000100000642000003B85A88D055.png" manifest:media-type="image/png"/>
  <manifest:file-entry manifest:full-path="Pictures/1000000100000566000004C46EEA5046.png" manifest:media-type="image/png"/>
  <manifest:file-entry manifest:full-path="Pictures/1000000100000506000004C21BE7A3BF.png" manifest:media-type="image/png"/>
  <manifest:file-entry manifest:full-path="Pictures/10000001000004DA0000043005424D70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45aac6"/>
    </style:style>
    <style:style style:name="P2" style:family="paragraph" style:parent-style-name="Standard">
      <style:text-properties officeooo:paragraph-rsid="0045aac6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8pt" fo:font-weight="bold" officeooo:rsid="003300f1" officeooo:paragraph-rsid="0045aa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officeooo:paragraph-rsid="0043f297"/>
    </style:style>
    <style:style style:name="P5" style:family="paragraph" style:parent-style-name="Standard">
      <style:text-properties officeooo:paragraph-rsid="0043f297"/>
    </style:style>
    <style:style style:name="P6" style:family="paragraph" style:parent-style-name="Standard">
      <style:text-properties fo:font-weight="bold" officeooo:paragraph-rsid="0043f297" style:font-weight-asian="bold" style:font-weight-complex="bold"/>
    </style:style>
    <style:style style:name="P7" style:family="paragraph" style:parent-style-name="Standard">
      <style:text-properties fo:font-weight="bold" officeooo:paragraph-rsid="005a693d" style:font-weight-asian="bold" style:font-weight-complex="bold"/>
    </style:style>
    <style:style style:name="P8" style:family="paragraph" style:parent-style-name="Standard">
      <style:text-properties fo:font-weight="normal" officeooo:paragraph-rsid="005a9de3" style:font-weight-asian="normal" style:font-weight-complex="normal"/>
    </style:style>
    <style:style style:name="P9" style:family="paragraph" style:parent-style-name="Standard">
      <style:text-properties style:text-line-through-style="none" style:text-line-through-type="none" fo:font-weight="normal" officeooo:rsid="0059bb60" officeooo:paragraph-rsid="005a9de3" style:font-weight-asian="normal" style:font-weight-complex="normal"/>
    </style:style>
    <style:style style:name="P10" style:family="paragraph" style:parent-style-name="Standard">
      <style:text-properties style:text-line-through-style="none" style:text-line-through-type="none" fo:font-weight="normal" officeooo:rsid="0059bb60" officeooo:paragraph-rsid="0059bb60" style:font-weight-asian="normal" style:font-weight-complex="normal"/>
    </style:style>
    <style:style style:name="P11" style:family="paragraph" style:parent-style-name="Standard">
      <style:text-properties fo:font-weight="normal" officeooo:paragraph-rsid="0043f29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43f297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43f297"/>
    </style:style>
    <style:style style:name="P14" style:family="paragraph" style:parent-style-name="Standard">
      <style:text-properties officeooo:paragraph-rsid="0059bb60"/>
    </style:style>
    <style:style style:name="P15" style:family="paragraph" style:parent-style-name="Standard">
      <style:paragraph-properties fo:text-align="center" style:justify-single-word="false"/>
      <style:text-properties officeooo:paragraph-rsid="0059bb60"/>
    </style:style>
    <style:style style:name="P16" style:family="paragraph" style:parent-style-name="Standard">
      <style:paragraph-properties fo:text-align="center" style:justify-single-word="false"/>
      <style:text-properties officeooo:paragraph-rsid="0044e365"/>
    </style:style>
    <style:style style:name="P17" style:family="paragraph" style:parent-style-name="Standard">
      <style:paragraph-properties fo:text-align="center" style:justify-single-word="false" fo:break-before="page"/>
      <style:text-properties officeooo:paragraph-rsid="004b7797"/>
    </style:style>
    <style:style style:name="P18" style:family="paragraph" style:parent-style-name="Standard">
      <style:text-properties fo:font-weight="bold" officeooo:paragraph-rsid="004b30ff" style:font-weight-asian="bold" style:font-weight-complex="bold"/>
    </style:style>
    <style:style style:name="P19" style:family="paragraph" style:parent-style-name="Standard">
      <style:text-properties fo:font-weight="bold" officeooo:rsid="0069de3a" officeooo:paragraph-rsid="0069de3a" style:font-weight-asian="bold" style:font-weight-complex="bold"/>
    </style:style>
    <style:style style:name="P20" style:family="paragraph" style:parent-style-name="Standard">
      <style:text-properties fo:font-weight="normal" officeooo:rsid="006b2503" officeooo:paragraph-rsid="006b2503" style:font-weight-asian="normal" style:font-weight-complex="normal"/>
    </style:style>
    <style:style style:name="P21" style:family="paragraph" style:parent-style-name="Standard">
      <style:text-properties fo:font-weight="normal" officeooo:paragraph-rsid="004b30ff" style:font-weight-asian="normal" style:font-weight-complex="normal"/>
    </style:style>
    <style:style style:name="P22" style:family="paragraph" style:parent-style-name="Standard">
      <style:text-properties officeooo:paragraph-rsid="004b30ff"/>
    </style:style>
    <style:style style:name="P23" style:family="paragraph" style:parent-style-name="Standard">
      <style:text-properties officeooo:rsid="0010a1db" officeooo:paragraph-rsid="004b30ff"/>
    </style:style>
    <style:style style:name="P24" style:family="paragraph" style:parent-style-name="Standard">
      <style:text-properties officeooo:rsid="004cfce8" officeooo:paragraph-rsid="004cfce8"/>
    </style:style>
    <style:style style:name="P25" style:family="paragraph" style:parent-style-name="Standard">
      <style:text-properties officeooo:rsid="004ffdd5" officeooo:paragraph-rsid="004ffdd5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5d0467"/>
    </style:style>
    <style:style style:name="T3" style:family="text">
      <style:text-properties fo:font-size="20pt" fo:font-weight="bold" officeooo:rsid="0044e365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4b7797" style:font-size-asian="20pt" style:font-weight-asian="bold" style:font-size-complex="2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b2503" style:font-weight-asian="normal" style:font-weight-complex="normal"/>
    </style:style>
    <style:style style:name="T7" style:family="text">
      <style:text-properties fo:font-weight="normal" officeooo:rsid="006c052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6e657f"/>
    </style:style>
    <style:style style:name="T10" style:family="text">
      <style:text-properties fo:font-weight="bold" officeooo:rsid="0010a1db" style:font-weight-asian="bold" style:font-weight-complex="bold"/>
    </style:style>
    <style:style style:name="T11" style:family="text">
      <style:text-properties officeooo:rsid="0010a1db"/>
    </style:style>
    <style:style style:name="T12" style:family="text">
      <style:text-properties officeooo:rsid="00688a57"/>
    </style:style>
    <style:style style:name="T13" style:family="text">
      <style:text-properties officeooo:rsid="0069de3a"/>
    </style:style>
    <style:style style:name="T14" style:family="text">
      <style:text-properties officeooo:rsid="004cfce8"/>
    </style:style>
    <style:style style:name="T15" style:family="text">
      <style:text-properties fo:font-weight="bold" officeooo:rsid="0050ead6" style:font-weight-asian="bold" style:font-weight-complex="bold"/>
    </style:style>
    <style:style style:name="T16" style:family="text">
      <style:text-properties officeooo:rsid="0050ead6"/>
    </style:style>
    <style:style style:name="T17" style:family="text">
      <style:text-properties officeooo:rsid="006ee905"/>
    </style:style>
    <style:style style:name="T18" style:family="text">
      <style:text-properties officeooo:rsid="004ffdd5"/>
    </style:style>
    <style:style style:name="T19" style:family="text">
      <style:text-properties officeooo:rsid="00527978"/>
    </style:style>
    <style:style style:name="T20" style:family="text">
      <style:text-properties fo:font-weight="bold" officeooo:rsid="005331a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draw:frame draw:style-name="fr1" draw:name="Image5" text:anchor-type="char" svg:x="0.021cm" svg:y="0.46cm" svg:width="7.117cm" svg:height="5.867cm" draw:z-index="4"><draw:image xlink:href="Pictures/10000001000004DA0000043005424D70.png" xlink:type="simple" xlink:show="embed" xlink:actuate="onLoad" draw:mime-type="image/png"/></draw:frame><draw:frame draw:style-name="fr1" draw:name="Image1" text:anchor-type="char" svg:x="-0.415cm" svg:y="6.967cm" svg:width="7.846cm" svg:height="7.567cm" draw:z-index="3"><draw:image xlink:href="Pictures/1000000100000506000004C21BE7A3BF.png" xlink:type="simple" xlink:show="embed" xlink:actuate="onLoad" draw:mime-type="image/png"/></draw:frame><draw:frame draw:style-name="fr1" draw:name="Image6" text:anchor-type="char" svg:x="9.088cm" svg:y="1.244cm" svg:width="8.259cm" svg:height="7.341cm" draw:z-index="5"><draw:image xlink:href="Pictures/1000000100000566000004C46EEA5046.png" xlink:type="simple" xlink:show="embed" xlink:actuate="onLoad" draw:mime-type="image/png"/></draw:frame><draw:frame draw:style-name="fr1" draw:name="Image7" text:anchor-type="char" svg:x="9.629cm" svg:y="9.811cm" svg:width="7.087cm" svg:height="4.212cm" draw:z-index="6"><draw:image xlink:href="Pictures/1000000100000642000003B85A88D055.png" xlink:type="simple" xlink:show="embed" xlink:actuate="onLoad" draw:mime-type="image/png"/></draw:frame></text:p>
      <text:p text:style-name="P4"><text:span text:style-name="T1">Arduino IDE</text:span><text:span text:style-name="Strong_20_Emphasis"><text:span text:style-name="T1">®</text:span></text:span></text:p>
      <text:p text:style-name="P5"><text:span text:style-name="Strong_20_Emphasis"/></text:p>
      <text:p text:style-name="P5"><text:span text:style-name="Strong_20_Emphasis">1/ Donwload Arduino &gt;= V1.8.19 </text:span></text:p>
      <text:p text:style-name="P5"/>
      <text:p text:style-name="P6">2/ Launch Arduino</text:p>
      <text:p text:style-name="P5"/>
      <text:p text:style-name="P6">3/ In Arduino-&gt;Preferences-&gt;Additional Board Manager URLS</text:p>
      <text:p text:style-name="P7"/>
      <text:p text:style-name="P8">add for Arduino <text:span text:style-name="T2">All </text:span>Version<text:span text:style-name="T2">s :</text:span></text:p>
      <text:p text:style-name="P9"/>
      <text:p text:style-name="P9">https://master.dl.sourceforge.net/project/stc89/packages/package_ardui89_index.json?viasf=1</text:p>
      <text:p text:style-name="P10"/>
      <text:p text:style-name="P11"/>
      <text:p text:style-name="P12"><draw:frame draw:style-name="fr2" draw:name="Image2" text:anchor-type="as-char" svg:width="9.999cm" svg:height="6.75cm" draw:z-index="0"><draw:image xlink:href="Pictures/1000000100000780000004B055BC5011.png" xlink:type="simple" xlink:show="embed" xlink:actuate="onLoad" draw:mime-type="image/png"/></draw:frame></text:p>
      <text:p text:style-name="P12"/>
      <text:p text:style-name="P6">4/ In Tools-&gt;Boards:...-&gt;Board Manager</text:p>
      <text:p text:style-name="P5"><text:s text:c="4"/>search "8051"</text:p>
      <text:p text:style-name="P5"><text:s text:c="4"/>select and install "ardui89 8051 family Boards"</text:p>
      <text:p text:style-name="P5"/>
      <text:p text:style-name="P13"><text:s text:c="4"/><draw:frame draw:style-name="fr3" draw:name="Image3" text:anchor-type="as-char" svg:width="9.999cm" svg:height="5.47cm" draw:z-index="1"><draw:image xlink:href="Pictures/10000001000004E2000002AC6F1DE1D5.png" xlink:type="simple" xlink:show="embed" xlink:actuate="onLoad" draw:mime-type="image/png"/></draw:frame></text:p>
      <text:p text:style-name="P13"/>
      <text:p text:style-name="P6">5/ In Tools-&gt;Board:...</text:p>
      <text:p text:style-name="P5"><text:s text:c="4"/>select "Board : "STC89C51" "STC89C52" "....""</text:p>
      <text:p text:style-name="P5"><text:s text:c="4"/></text:p>
      <text:p text:style-name="P6">6/ Demos :</text:p>
      <text:p text:style-name="P5"><text:s text:c="4"/>Use Blink.ino in basics examples or in Ardui89_demos path :</text:p>
      <text:p text:style-name="P5"><text:s text:c="4"/>Hello.ino</text:p>
      <text:p text:style-name="P5"><text:s text:c="4"/>Howareyou.ino</text:p>
      <text:p text:style-name="P14"><text:soft-page-break/><text:s text:c="4"/>and build and upload !</text:p>
      <text:p text:style-name="P14"><text:span text:style-name="Strong_20_Emphasis"><text:span text:style-name="T3"/></text:span></text:p>
      <text:p text:style-name="P15"><text:span text:style-name="Strong_20_Emphasis"><text:span text:style-name="T3">Examples</text:span></text:span></text:p>
      <text:p text:style-name="P16"><text:span text:style-name="Strong_20_Emphasis"><text:span text:style-name="T3"/></text:span></text:p>
      <text:p text:style-name="P16"><text:span text:style-name="Strong_20_Emphasis"><text:span text:style-name="T3"><draw:frame draw:style-name="fr2" draw:name="Image4" text:anchor-type="as-char" svg:width="12.582cm" svg:height="14.796cm" draw:z-index="2"><draw:image xlink:href="Pictures/100000010000047000000538C1647976.png" xlink:type="simple" xlink:show="embed" xlink:actuate="onLoad" draw:mime-type="image/png"/></draw:frame></text:span></text:span></text:p>
      <text:p text:style-name="P16"><text:span text:style-name="Strong_20_Emphasis"><text:span text:style-name="T3"/></text:span></text:p>
      <text:p text:style-name="P17"><text:span text:style-name="Strong_20_Emphasis"><text:span text:style-name="T4">Functions Arduino / Ardui89 </text:span></text:span></text:p>
      <text:p text:style-name="P18"/>
      <text:p text:style-name="P19">analogPin(pin)<text:span text:style-name="T5"> : since 0.4.2, </text:span><text:span text:style-name="T6">optimized code that saves 200 bytes, </text:span><text:span text:style-name="T5">configure a pin </text:span><text:span text:style-name="T7">as</text:span><text:span text:style-name="T5"> analog input (A0, A</text:span><text:span text:style-name="T6">1..) </text:span></text:p>
      <text:p text:style-name="P20"/>
      <text:p text:style-name="P20">or <text:span text:style-name="T8">pinMode(pin, INPUT_ANALOG) </text:span>: since version 0.4.2, <text:span text:style-name="T9">Arduino style code, </text:span>configure a pin as an analog input (A0, A1..) but with 200 more bytes.</text:p>
      <text:p text:style-name="P21"/>
      <text:p text:style-name="P22"><text:span text:style-name="T8">analogRead</text:span><text:span text:style-name="T10">(pin) </text:span><text:span text:style-name="T11">: </text:span><text:span text:style-name="T12">read analog value from analog pin channel (A0, A1...)</text:span></text:p>
      <text:p text:style-name="P22"/>
      <text:p text:style-name="P22"><text:span text:style-name="T8">digitalWrite</text:span><text:span text:style-name="T10">(pin, state) </text:span><text:span text:style-name="T11">: since 0.0.1</text:span></text:p>
      <text:p text:style-name="P22"/>
      <text:p text:style-name="P22"><text:span text:style-name="T8">digitalRead</text:span><text:span text:style-name="T10">(pin) </text:span><text:span text:style-name="T11">: </text:span><text:span text:style-name="T13">since 0.3.7</text:span></text:p>
      <text:p text:style-name="P22"/>
      <text:p text:style-name="P22"><text:span text:style-name="T8">delay</text:span><text:span text:style-name="T10">(ms) </text:span><text:span text:style-name="T11">: since 0.0.1</text:span></text:p>
      <text:p text:style-name="P23"/>
      <text:p text:style-name="P23"><text:span text:style-name="T8">delayMicroseconds(us) </text:span>: since 0.0.1</text:p>
      <text:p text:style-name="P23"/>
      <text:p text:style-name="P23"><text:span text:style-name="T8">int_to_string(int) </text:span>: since 0.<text:span text:style-name="T14">3</text:span>.1<text:span text:style-name="T14">0</text:span>, exclusively in C for 8051</text:p>
      <text:p text:style-name="P23"/>
      <text:p text:style-name="P23"><text:span text:style-name="T8">memcpy_P</text:span><text:span text:style-name="T15">(dest, src, size) </text:span><text:span text:style-name="T16">: since 0.3.10</text:span></text:p>
      <text:p text:style-name="P22"/>
      <text:p text:style-name="P22"><text:span text:style-name="T8">pinMode</text:span><text:span text:style-name="T10"> </text:span><text:span text:style-name="T11">: since 0.0.1</text:span></text:p>
      <text:p text:style-name="P22"/>
      <text:p text:style-name="P24"><text:span text:style-name="T8">PROMEM</text:span> : since 0.0.1</text:p>
      <text:p text:style-name="P23"/>
      <text:p text:style-name="P24"><text:span text:style-name="T8">8051/prgspace.h </text:span>: since 0.3.10</text:p>
      <text:p text:style-name="P23"/>
      <text:p text:style-name="P23"><text:span text:style-name="T8">Serial89Init() </text:span>: <text:span text:style-name="T17">si</text:span>nce version 0.0.1, exclusively in C for the 8051 architecture. Required for use of the serial connection.</text:p>
      <text:p text:style-name="P25"/>
      <text:p text:style-name="P25">Example :</text:p>
      <text:p text:style-name="P25"/>
      <text:p text:style-name="P23">// Serial port init</text:p>
      <text:p text:style-name="P23">#if defined(ARDUINO_ARCH_8051)</text:p>
      <text:p text:style-name="P23">Serial89Init(); // Serial 89 init</text:p>
      <text:p text:style-name="P23">#endif</text:p>
      <text:p text:style-name="P23"/>
      <text:p text:style-name="P23"><text:span text:style-name="T18">S</text:span>erial.begin(9600); // Monitor init (F_CPU = 11.0592Mhz)</text:p>
      <text:p text:style-name="P23"/>
      <text:p text:style-name="P23">// <text:span text:style-name="T19">Message</text:span></text:p>
      <text:p text:style-name="P23">Serial.println("<text:span text:style-name="T18">Hello, the world !</text:span>");</text:p>
      <text:p text:style-name="P22"/>
      <text:p text:style-name="P22"><text:span text:style-name="T8">Serial.begin</text:span><text:span text:style-name="T10">(bauds)</text:span><text:span text:style-name="T11"> : since 0.0.1</text:span></text:p>
      <text:p text:style-name="P22"/>
      <text:p text:style-name="P22"><text:span text:style-name="T8">Serial.print</text:span><text:span text:style-name="T10">(data)</text:span><text:span text:style-name="T11"> : since 0.0.1 like printf in C, not Arduino C++</text:span></text:p>
      <text:p text:style-name="P22"/>
      <text:p text:style-name="P22"><text:span text:style-name="T8">Serial.print</text:span><text:span text:style-name="T10">ln(data) </text:span><text:span text:style-name="T11">: since 0.0.1 like printf in C, with \n, not Arduino C++</text:span></text:p>
      <text:p text:style-name="P22"/>
      <text:p text:style-name="P22"><text:span text:style-name="T8">tone</text:span><text:span text:style-name="T10">(frequency</text:span><text:span text:style-name="T20"> </text:span><text:span text:style-name="T10">(</text:span><text:span text:style-name="T20">, </text:span><text:span text:style-name="T10">duration))</text:span><text:span text:style-name="T11"> : since 0.0.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3bfe24" officeooo:paragraph-rsid="003bfe24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weight="normal" officeooo:rsid="004769b0" officeooo:paragraph-rsid="004769b0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  <style:text-properties officeooo:rsid="003b6600" officeooo:paragraph-rsid="003b6600"/>
    </style:style>
    <style:style style:name="MT1" style:family="text">
      <style:text-properties officeooo:rsid="0042ada4"/>
    </style:style>
    <style:style style:name="MT2" style:family="text">
      <style:text-properties officeooo:rsid="0045aac6"/>
    </style:style>
    <style:style style:name="MT3" style:family="text">
      <style:text-properties officeooo:rsid="00639419"/>
    </style:style>
    <style:style style:name="MT4" style:family="text">
      <style:text-properties officeooo:rsid="00688a5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ASHEET<text:span text:style-name="MT1"> / USER MANUAL</text:span> / ARDUI89 <text:span text:style-name="MT2">FAMILY</text:span></text:p>
        <text:p text:style-name="MP2">(version 202<text:span text:style-name="MT3">6</text:span>.<text:span text:style-name="MT3">0</text:span><text:span text:style-name="MT4">5</text:span>)</text:p>
      </style:header>
      <style:footer>
        <text:p text:style-name="MP3">- <text:page-number text:select-page="current">2</text:page-number>/<text:page-count>4</text:page-count> -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7:12:09.591341721</meta:creation-date>
    <dc:date>2026-05-16T19:51:49.930759000</dc:date>
    <meta:editing-duration>PT1H21M30S</meta:editing-duration>
    <meta:editing-cycles>94</meta:editing-cycles>
    <meta:generator>LibreOffice/25.8.4.2$MacOSX_AARCH64 LibreOffice_project/290daaa01b999472f0c7a3890eb6a550fd74c6df</meta:generator>
    <meta:document-statistic meta:table-count="0" meta:image-count="7" meta:object-count="0" meta:page-count="4" meta:paragraph-count="50" meta:word-count="259" meta:character-count="1815" meta:non-whitespace-character-count="1563"/>
  </office:meta>
</office:document-meta>
</file>